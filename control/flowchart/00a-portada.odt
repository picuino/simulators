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Liberation Sans" fo:font-size="24pt" fo:font-weight="bold" officeooo:rsid="001ce745" officeooo:paragraph-rsid="001ce745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style:font-name="Liberation Sans" fo:font-size="16pt" fo:font-weight="bold" officeooo:rsid="001ce745" officeooo:paragraph-rsid="001ce745" style:font-size-asian="16pt" style:font-weight-asian="bold" style:font-size-complex="16pt" style:font-weight-complex="bold"/>
    </style:style>
    <style:style style:name="T1" style:family="text">
      <style:text-properties officeooo:rsid="001d5bbd"/>
    </style:style>
    <style:style style:name="T2" style:family="text">
      <style:text-properties officeooo:rsid="001da0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IAGRAMAS DE FLUJO DEL PROGRAMA</text:p>
      <text:p text:style-name="P1">SIMULADOR <text:span text:style-name="T1">DE </text:span><text:span text:style-name="T2">CONTROL</text:span> PICUINO</text:p>
      <text:p text:style-name="P2"/>
      <text:p text:style-name="P2"><text:tab/>LENGUAJE DEL PROGRAMA: JAVASCRIPT</text:p>
      <text:p text:style-name="P2"><text:tab/>AUTOR: CARLOS FÉLIX PARDO MARTÍ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3T19:27:41.718224000</meta:creation-date>
    <dc:date>2026-07-08T09:38:23.357344000</dc:date>
    <meta:editing-duration>PT3M3S</meta:editing-duration>
    <meta:editing-cycles>3</meta:editing-cycles>
    <meta:generator>LibreOffice/25.8.7.3$Windows_X86_64 LibreOffice_project/30742500f2d3eb4366ac312fa33d3dcabdb3eba5</meta:generator>
    <meta:document-statistic meta:table-count="0" meta:image-count="0" meta:object-count="0" meta:page-count="1" meta:paragraph-count="4" meta:word-count="18" meta:character-count="126" meta:non-whitespace-character-count="110"/>
  </office:meta>
</office:document-meta>
</file>